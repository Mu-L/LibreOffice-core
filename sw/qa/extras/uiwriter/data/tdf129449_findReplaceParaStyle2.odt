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erif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itle">
      <style:text-properties officeooo:paragraph-rsid="000636a4"/>
    </style:style>
    <style:style style:name="P2" style:family="paragraph" style:parent-style-name="Text_20_body">
      <style:text-properties officeooo:rsid="000a22ea" officeooo:paragraph-rsid="000636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itle style above and below this paragraph. But Find &amp; Replace was not able to find these empty paragraphs at the start and end of the document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erif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" fo:font-family="'Liberation Serif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5T14:42:17.141152399</meta:creation-date>
    <dc:date>2026-07-15T14:42:56.048843275</dc:date>
    <meta:editing-duration>PT39S</meta:editing-duration>
    <meta:editing-cycles>1</meta:editing-cycles>
    <meta:document-statistic meta:table-count="0" meta:image-count="0" meta:object-count="0" meta:page-count="1" meta:paragraph-count="1" meta:word-count="27" meta:character-count="144" meta:non-whitespace-character-count="118"/>
    <meta:generator>LibreOffice/26.2.4.2$Linux_X86_64 LibreOffice_project/620$Build-2</meta:generator>
  </office:meta>
</office:document-meta>
</file>